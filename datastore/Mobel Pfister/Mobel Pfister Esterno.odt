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11.906cm" style:rel-column-width="65024*"/>
    </style:style>
    <style:style style:name="Tabella1.B" style:family="table-column">
      <style:table-column-properties style:column-width="0.093cm" style:rel-column-width="511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1a116f" officeooo:paragraph-rsid="00aae221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8f47ca" officeooo:paragraph-rsid="00910647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8f47ca" officeooo:paragraph-rsid="00910647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cord in get_report_label(data)"&gt;</text:placeholder></text:p>
      <text:p text:style-name="P6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/>
            <text:p text:style-name="P3">ART. <text:span text:style-name="T1"><text:placeholder text:placeholder-type="text">&lt;record.get('code', '???')&gt;</text:placeholder></text:span></text:p>
            <text:p text:style-name="P4"><text:placeholder text:placeholder-type="text">&lt;record.get('fabric', '???')&gt;</text:placeholder></text:p>
            <text:p text:style-name="P4"><text:placeholder text:placeholder-type="text">&lt;record.get('frame', '???')&gt;</text:placeholder></text:p>
            <text:p text:style-name="P4"><text:placeholder text:placeholder-type="text">&lt;record.get('color', '???')&gt;</text:placeholder></text:p>
            <text:p text:style-name="P4"><text:placeholder text:placeholder-type="text">&lt;record.get('canvas', '???')&gt;</text:placeholder></text:p>
            <text:p text:style-name="P4"><text:placeholder text:placeholder-type="text">&lt;record.get('q_x_pack', '?')&gt;</text:placeholder></text:p>
            <text:p text:style-name="P4"/>
            <text:p text:style-name="P9"><draw:frame draw:style-name="fr1" draw:name="Cornice1" text:anchor-type="as-char" svg:y="-0.497cm" svg:width="3.884cm" svg:height="1.692cm" draw:z-index="0"><draw:text-box><text:p text:style-name="P11"/></draw:text-box></draw:frame></text:p>
          </table:table-cell>
          <table:table-cell table:style-name="Tabella1.A1" office:value-type="string">
            <text:p text:style-name="P13"/>
            <text:p text:style-name="P12"/>
          </table:table-cell>
        </table:table-row>
      </table:table>
      <text:p text:style-name="P2"/>
      <text:p text:style-name="P2"/>
      <text:p text:style-name="P7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5:51:47.213152872</dc:date>
    <meta:editing-duration>PT12H38M1S</meta:editing-duration>
    <meta:editing-cycles>157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5" meta:character-count="290" meta:non-whitespace-character-count="275"/>
  </office:meta>
</office:document-meta>
</file>